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470" officeooo:paragraph-rsid="0009c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W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8:41:57.429603351</meta:creation-date>
    <dc:date>2026-06-19T18:42:25.71767469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4.2.7.2$Linux_X86_64 LibreOffice_project/420$Build-2</meta:generator>
  </office:meta>
</office:document-meta>
</file>